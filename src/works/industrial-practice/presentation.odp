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padding-top="8.305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58.38pt" fo:text-align="center" fo:margin-left="1.049pt" fo:margin-right="0.3968pt" fo:text-indent="-0.05622pt" fo:margin-top="8.3pt" fo:margin-bottom="0pt"/>
      <style:text-properties/>
    </style:style>
    <style:style style:family="text" style:name="T1">
      <style:text-properties fo:color="#000000" fo:font-family="Arial" style:font-family-complex="Arial" fo:font-size="54pt" style:font-size-asian="54pt" style:font-size-complex="54pt" fo:letter-spacing="0pt" fo:language="ru" fo:country="RU" style:text-underline-type="none" fo:font-weight="bold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11">
      <style:paragraph-properties fo:line-height="100%" fo:text-align="right" fo:margin-left="0pt" fo:margin-right="0pt" fo:text-indent="0pt" fo:margin-top="15.99pt" fo:margin-bottom="0pt"/>
      <style:text-properties/>
    </style:style>
    <style:style style:family="paragraph" style:name="P12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2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paragraph" style:name="P13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3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4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5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6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7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8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9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0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11">
      <style:text-properties style:text-line-through-type="none" fo:font-family="Arial" style:font-family-complex="Arial" fo:font-size="24pt" style:font-size-asian="24pt" style:font-size-complex="24pt" fo:letter-spacing="-0.11pt" style:text-underline-type="none"/>
    </style:style>
    <style:style style:family="text" style:name="T12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paragraph" style:name="P14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3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4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paragraph" style:name="P15">
      <style:paragraph-properties fo:line-height="100%" fo:text-align="right" fo:margin-left="0pt" fo:margin-right="0.8502pt" fo:text-indent="0pt" fo:margin-top="0pt" fo:margin-bottom="0pt"/>
      <style:text-properties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6">
      <style:paragraph-properties/>
      <style:text-properties/>
    </style:style>
    <style:style style:family="paragraph" style:name="P17">
      <style:paragraph-properties/>
      <style:text-properties/>
    </style:style>
    <style:style style:family="drawing-page" style:name="dp7">
      <style:drawing-page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18">
      <style:paragraph-properties/>
      <style:text-properties/>
    </style:style>
    <style:style style:family="paragraph" style:name="P19">
      <style:paragraph-properties fo:text-align="right"/>
      <style:text-properties/>
    </style:style>
    <style:style style:family="text" style:name="T15">
      <style:text-properties style:text-line-through-type="none" fo:font-size="36pt" style:font-size-asian="36pt" style:font-size-complex="36pt" fo:language="ru" fo:country="RU"/>
    </style:style>
    <style:style style:family="presentation" style:name="pr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20">
      <style:paragraph-properties/>
      <style:text-properties/>
    </style:style>
    <style:style style:family="paragraph" style:name="P21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6">
      <style:text-properties fo:color="#000000" fo:font-family="Arial" style:font-family-complex="Arial" fo:font-size="44pt" style:font-size-asian="44pt" style:font-size-complex="44pt" style:text-underline-type="none" fo:font-weight="bold"/>
    </style:style>
    <style:style style:family="text" style:name="T17">
      <style:text-properties fo:color="#000000" fo:font-family="Arial" style:font-family-complex="Arial" fo:font-size="44pt" style:font-size-asian="44pt" style:font-size-complex="44pt" fo:letter-spacing="-2.86pt" style:text-underline-type="none" fo:font-weight="bold"/>
    </style:style>
    <style:style style:family="text" style:name="T18">
      <style:text-properties fo:color="#000000" fo:font-family="Arial" style:font-family-complex="Arial" fo:font-size="44pt" style:font-size-asian="44pt" style:font-size-complex="44pt" fo:letter-spacing="-0.11pt" fo:language="ru" fo:country="RU" style:text-underline-type="none" fo:font-weight="bold"/>
    </style:style>
    <style:style style:family="text" style:name="T19">
      <style:text-properties fo:color="#000000" fo:font-family="Arial" style:font-family-complex="Arial" fo:font-size="44pt" style:font-size-asian="44pt" style:font-size-complex="44pt" fo:letter-spacing="-0.11pt" style:text-underline-type="none" fo:font-weight="bold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22">
      <style:paragraph-properties fo:line-height="100%" fo:text-align="left" fo:margin-left="0.992pt" fo:margin-right="0pt" fo:text-indent="0pt" fo:margin-top="0.99pt" fo:margin-bottom="0pt"/>
      <style:text-properties/>
    </style:style>
    <style:style style:family="text" style:name="T20">
      <style:text-properties style:text-line-through-type="none" fo:font-family="Arial" style:font-family-complex="Arial" fo:font-size="24pt" style:font-size-asian="24pt" style:font-size-complex="24pt" fo:letter-spacing="-0.11pt" style:text-underline-type="none" fo:font-weight="bold"/>
    </style:style>
    <style:style style:family="text" style:name="T21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 fo:font-weight="bold"/>
    </style:style>
    <style:style style:family="text" style:name="T22">
      <style:text-properties fo:color="#000000" fo:font-family="Arial" style:font-family-complex="Arial" fo:font-size="24pt" style:font-size-asian="24pt" style:font-size-complex="24pt" fo:letter-spacing="-0.1pt" fo:language="ru" fo:country="RU" style:text-underline-type="none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3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23">
      <style:text-properties style:text-line-through-type="none"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24">
      <style:paragraph-properties fo:margin-left="28.56pt" fo:text-indent="-27.56pt"/>
      <style:text-properties/>
    </style:style>
    <style:style style:family="text" style:name="T24">
      <style:text-properties fo:color="#000000" fo:font-family="Arial" style:font-family-complex="Arial" fo:font-size="24pt" style:font-size-asian="24pt" style:font-size-complex="24pt" fo:letter-spacing="0pt" fo:language="ru" fo:country="RU" style:text-underline-type="none"/>
    </style:style>
    <style:style style:family="paragraph" style:name="P25">
      <style:paragraph-properties/>
      <style:text-properties/>
    </style:style>
    <style:style style:family="text" style:name="T25">
      <style:text-properties fo:color="#000000" fo:font-family="Arial" style:font-family-complex="Arial" fo:font-size="24pt" style:font-size-asian="24pt" style:font-size-complex="24pt" fo:letter-spacing="0pt" fo:language="ru" fo:country="RU" style:text-underline-type="none"/>
    </style:style>
    <style:style style:family="paragraph" style:name="P26">
      <style:paragraph-properties/>
      <style:text-properties/>
    </style:style>
    <style:style style:family="text" style:name="T26">
      <style:text-properties fo:color="#000000" fo:font-family="Arial" style:font-family-complex="Arial" fo:font-size="24pt" style:font-size-asian="24pt" style:font-size-complex="24pt" fo:letter-spacing="0pt" fo:language="ru" fo:country="RU" style:text-underline-type="none"/>
    </style:style>
    <style:style style:family="paragraph" style:name="P27">
      <style:paragraph-properties/>
      <style:text-properties/>
    </style:style>
    <style:style style:family="text" style:name="T27">
      <style:text-properties fo:color="#000000" fo:font-family="Arial" style:font-family-complex="Arial" fo:font-size="24pt" style:font-size-asian="24pt" style:font-size-complex="24pt" fo:letter-spacing="0pt" fo:language="ru" fo:country="RU" style:text-underline-type="none"/>
    </style:style>
    <style:style style:family="paragraph" style:name="P2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28">
      <style:text-properties fo:color="#000000" fo:font-family="Arial" style:font-family-complex="Arial" fo:font-size="24pt" style:font-size-asian="24pt" style:font-size-complex="24pt" fo:letter-spacing="0pt" fo:language="ru" fo:country="RU" style:text-underline-type="none"/>
    </style:style>
    <style:style style:family="text" style:name="T29">
      <style:text-properties fo:font-size="24pt" style:font-size-asian="24pt" style:font-size-complex="24pt" fo:language="ru" fo:country="RU"/>
    </style:style>
    <style:style style:family="drawing-page" style:name="dp8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/>
      <style:text-properties/>
    </style:style>
    <style:style style:family="drawing-page" style:name="dp11">
      <style:drawing-page-properties/>
    </style:style>
    <style:style style:family="presentation" style:name="pr1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35">
      <style:paragraph-properties/>
      <style:text-properties/>
    </style:style>
    <style:style style:family="paragraph" style:name="P36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30">
      <style:text-properties fo:color="#000000" fo:font-family="Arial" style:font-family-asian="Arial" style:font-family-complex="Arial" fo:font-size="44pt" style:font-size-asian="44pt" style:font-size-complex="44pt" fo:letter-spacing="-0.11pt" fo:language="ru" fo:country="RU" style:text-underline-type="none" fo:font-weight="bold"/>
    </style:style>
    <style:style style:family="presentation" style:name="pr11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37">
      <style:paragraph-properties/>
      <style:text-properties/>
    </style:style>
    <style:style style:family="paragraph" style:name="P38">
      <style:paragraph-properties fo:line-height="38.21pt" fo:text-align="right" fo:margin-left="24.55pt" fo:margin-right="0pt" fo:text-indent="0pt" fo:margin-top="0pt" fo:margin-bottom="0pt"/>
      <style:text-properties/>
    </style:style>
    <style:style style:family="text" style:name="T31">
      <style:text-properties/>
    </style:style>
    <style:style style:parent-style-name="Graphics" style:family="graphic" style:name="gr5">
      <style:graphic-properties style:repeat="stretch" style:wrap="run-through" fo:background-color="transparent"/>
    </style:style>
    <style:style style:family="drawing-page" style:name="dp12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9">
      <style:paragraph-properties/>
      <style:text-properties/>
    </style:style>
    <style:style style:family="paragraph" style:name="P40">
      <style:paragraph-properties/>
      <style:text-properties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41">
      <style:paragraph-properties/>
      <style:text-properties/>
    </style:style>
    <style:style style:family="paragraph" style:name="P42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32">
      <style:text-properties fo:font-family="Arial" style:font-family-asian="Arial" style:font-family-complex="Arial" fo:font-size="44pt" style:font-size-asian="44pt" style:font-size-complex="44pt" fo:language="ru" fo:country="RU" style:text-underline-type="none" fo:font-weight="bold"/>
    </style:style>
    <style:style style:family="presentation" style:name="pr14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43">
      <style:paragraph-properties/>
      <style:text-properties/>
    </style:style>
    <style:style style:family="paragraph" style:name="P44">
      <style:paragraph-properties fo:text-align="right"/>
      <style:text-properties/>
    </style:style>
    <style:style style:family="text" style:name="T33">
      <style:text-properties fo:font-size="36pt" style:font-size-asian="36pt" style:font-size-complex="36pt"/>
    </style:style>
    <style:style style:family="graphic" style:name="gr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">
      <style:paragraph-properties fo:margin-left="28.56pt" fo:text-indent="-27.56pt"/>
      <style:text-properties/>
    </style:style>
    <style:style style:family="text" style:name="T34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paragraph" style:name="P46">
      <style:paragraph-properties fo:margin-left="28.56pt" fo:text-indent="-27.56pt"/>
      <style:text-properties/>
    </style:style>
    <style:style style:family="text" style:name="T35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paragraph" style:name="P47">
      <style:paragraph-properties fo:margin-left="28.56pt" fo:text-indent="-27.56pt"/>
      <style:text-properties/>
    </style:style>
    <style:style style:family="text" style:name="T36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paragraph" style:name="P48">
      <style:paragraph-properties fo:margin-left="28.56pt" fo:text-indent="-27.56pt"/>
      <style:text-properties/>
    </style:style>
    <style:style style:family="text" style:name="T37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paragraph" style:name="P49">
      <style:paragraph-properties fo:margin-left="28.56pt" fo:text-indent="-27.56pt"/>
      <style:text-properties/>
    </style:style>
    <style:style style:family="text" style:name="T38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paragraph" style:name="P50">
      <style:paragraph-properties fo:margin-left="28.56pt" fo:text-indent="-27.56pt"/>
      <style:text-properties/>
    </style:style>
    <style:style style:family="text" style:name="T39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paragraph" style:name="P51">
      <style:paragraph-properties fo:margin-left="28.56pt" fo:text-indent="-27.56pt"/>
      <style:text-properties/>
    </style:style>
    <style:style style:family="text" style:name="T40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drawing-page" style:name="dp14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2">
      <style:paragraph-properties/>
      <style:text-properties/>
    </style:style>
    <style:style style:family="paragraph" style:name="P53">
      <style:paragraph-properties/>
      <style:text-properties/>
    </style:style>
    <style:style style:family="drawing-page" style:name="dp15">
      <style:drawing-page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54">
      <style:paragraph-properties/>
      <style:text-properties/>
    </style:style>
    <style:style style:family="paragraph" style:name="P55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41">
      <style:text-properties fo:color="#000000" fo:font-family="Arial" style:font-family-asian="Arial" style:font-family-complex="Arial" fo:font-size="44pt" style:font-size-asian="44pt" style:font-size-complex="44pt" fo:language="ru" fo:country="RU" style:text-underline-type="none" fo:font-weight="bold"/>
    </style:style>
    <style:style style:family="graphic" style:name="gr7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56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2">
      <style:text-properties style:text-line-through-type="none"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8">
      <style:graphic-properties style:repeat="stretch" style:wrap="run-through" fo:background-color="transparent"/>
    </style:style>
    <style:style style:family="drawing-page" style:name="dp16">
      <style:drawing-page-properties/>
    </style:style>
    <style:style style:family="presentation" style:name="pr1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7">
      <style:paragraph-properties/>
      <style:text-properties/>
    </style:style>
    <style:style style:family="paragraph" style:name="P58">
      <style:paragraph-properties/>
      <style:text-properties/>
    </style:style>
    <style:style style:family="drawing-page" style:name="dp17">
      <style:drawing-page-properties/>
    </style:style>
    <style:style style:family="presentation" style:name="pr18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59">
      <style:paragraph-properties/>
      <style:text-properties/>
    </style:style>
    <style:style style:family="paragraph" style:name="P60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43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9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61">
      <style:paragraph-properties/>
      <style:text-properties/>
    </style:style>
    <style:style style:family="text" style:name="T44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45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ru" fo:country="RU" fo:font-style="normal" style:text-underline-type="none" fo:font-weight="normal"/>
    </style:style>
    <style:style style:family="paragraph" style:name="P62">
      <style:paragraph-properties/>
      <style:text-properties/>
    </style:style>
    <style:style style:family="paragraph" style:name="P63">
      <style:paragraph-properties/>
      <style:text-properties/>
    </style:style>
    <style:style style:family="text" style:name="T46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47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48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64">
      <style:paragraph-properties/>
      <style:text-properties/>
    </style:style>
    <style:style style:family="text" style:name="T49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65">
      <style:paragraph-properties/>
      <style:text-properties/>
    </style:style>
    <style:style style:family="text" style:name="T50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66">
      <style:paragraph-properties/>
      <style:text-properties/>
    </style:style>
    <style:style style:family="text" style:name="T51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67">
      <style:paragraph-properties/>
      <style:text-properties/>
    </style:style>
    <style:style style:family="text" style:name="T52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68">
      <style:paragraph-properties/>
      <style:text-properties/>
    </style:style>
    <style:style style:family="paragraph" style:name="P69">
      <style:paragraph-properties fo:line-height="90%" fo:text-align="left" fo:margin-top="4.39pt" fo:margin-bottom="0pt"/>
      <style:text-properties/>
    </style:style>
    <style:style style:family="text" style:name="T53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18">
      <style:drawing-page-properties/>
    </style:style>
    <style:style style:family="presentation" style:name="pr1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0">
      <style:paragraph-properties/>
      <style:text-properties/>
    </style:style>
    <style:style style:family="paragraph" style:name="P71">
      <style:paragraph-properties/>
      <style:text-properties/>
    </style:style>
    <style:style style:family="drawing-page" style:name="dp19">
      <style:drawing-page-properties/>
    </style:style>
    <style:style style:family="presentation" style:name="pr20">
      <style:graphic-properties draw:fill="none" draw:textarea-vertical-align="top" draw:auto-grow-height="true" draw:fit-to-size="false" style:shrink-to-fit="false" draw:stroke="none" style:wrap="run-through" fo:padding-top="0.9069pt" fo:padding-bottom="0pt" fo:padding-left="0pt" fo:padding-right="0pt" fo:background-color="transparent"/>
    </style:style>
    <style:style style:family="paragraph" style:name="P72">
      <style:paragraph-properties/>
      <style:text-properties/>
    </style:style>
    <style:style style:family="paragraph" style:name="P73">
      <style:paragraph-properties fo:line-height="100%" fo:text-align="left" fo:margin-left="0.992pt" fo:margin-right="0pt" fo:text-indent="0pt" fo:margin-top="0.91pt" fo:margin-bottom="0pt"/>
      <style:text-properties/>
    </style:style>
    <style:style style:family="text" style:name="T54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55">
      <style:text-properties fo:color="#000000" fo:font-family="Arial Black" style:font-family-complex="Arial Black" fo:font-size="44pt" style:font-size-asian="44pt" style:font-size-complex="44pt" fo:letter-spacing="-1.19pt" style:text-underline-type="none"/>
    </style:style>
    <style:style style:family="text" style:name="T56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57">
      <style:text-properties fo:color="#000000" fo:font-family="Arial Black" style:font-family-complex="Arial Black" fo:font-size="44pt" style:font-size-asian="44pt" style:font-size-complex="44pt" fo:letter-spacing="-0.95pt" style:text-underline-type="none"/>
    </style:style>
    <style:style style:family="text" style:name="T58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drawing-page" style:name="dp20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4">
      <style:paragraph-properties/>
      <style:text-properties/>
    </style:style>
    <style:style style:family="paragraph" style:name="P75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>
      <text:list-level-style-number text:level="1" style:num-format="1">
        <style:list-level-properties text:space-before="1pt" text:min-label-width="27.56pt"/>
        <style:text-properties fo:font-size="100%"/>
      </text:list-level-style-number>
    </text:list-style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17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18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19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0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1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2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</office:automatic-styles>
  <office:body>
    <office:presentation>
      <draw:page draw:name="page1" draw:style-name="dp5" draw:master-page-name="______5f__5f_5f_5f__5f_5f_5f__5f_5f_5f__5f_5f_5f_5f_5f_5f_5f_Title_5f_5f_5f_5f_5f_5f_5f_20_5f_5f_5f_5f_5f_5f_5f_and_5f_5f_5f_5f_5f_5f_5f_20_5f_5f_5f_5f_5f_5f_5f_Content" presentation:presentation-page-layout-name="AL1">
        <draw:frame xml:id="id3" draw:id="id3" draw:name="object 2" draw:text-style-name="P9" draw:layer="layout" presentation:style-name="pr3" presentation:class="outline" presentation:placeholder="true" svg:width="33.65cm" svg:height="6.473cm" svg:x="0.106cm" svg:y="1.482cm">
          <draw:text-box fo:min-height="6.473cm">
            <text:p text:style-name="P10"><text:span text:style-name="T1">Метапрограммирование в Android как способ устранения шаблонного кода</text:span></text:p>
          </draw:text-box>
        </draw:frame>
        <draw:frame xml:id="id4" draw:id="id4" draw:name="object 3" draw:style-name="gr2" svg:width="24.44cm" svg:height="3.931cm" svg:x="8.678cm" svg:y="10.1cm">
          <draw:text-box fo:min-height="3.931cm">
            <text:p text:style-name="P11"><text:span/></text:p>
            <text:p text:style-name="P12"><text:span text:style-name="T2">Выполнил</text:span></text:p>
            <text:p text:style-name="P13"><text:span text:style-name="T3">студент</text:span><text:span text:style-name="T4"><text:s/></text:span><text:span text:style-name="T5">4</text:span><text:span text:style-name="T6"><text:s/></text:span><text:span text:style-name="T7">курса</text:span><text:span text:style-name="T8"><text:s/></text:span><text:span text:style-name="T9">61</text:span><text:span text:style-name="T10"><text:s/></text:span><text:span text:style-name="T11">группы</text:span><text:span text:style-name="T12"><text:s/></text:span></text:p>
            <text:p text:style-name="P14"><text:span text:style-name="T13">Вафин А.Р</text:span><text:span text:style-name="T14">. </text:span></text:p>
            <text:p text:style-name="P15"><text:span/></text:p>
          </draw:text-box>
        </draw:frame>
        <presentation:notes draw:style-name="dp6">
          <draw:frame xml:id="id5" draw:id="id5" draw:text-style-name="P16" draw:layer="layout" presentation:style-name="pr4" presentation:class="outline" presentation:placeholder="true" svg:width="16.8cm" svg:height="13.36cm" svg:x="2.1cm" svg:y="14.11cm">
            <draw:text-box fo:min-height="13.36cm">
              <text:p text:style-name="P17"><text:span/></text:p>
            </draw:text-box>
          </draw:frame>
        </presentation:notes>
      </draw:page>
      <draw:page draw:name="Постановка задачи" draw:style-name="dp7" draw:master-page-name="______5f__5f_5f_5f__5f_5f_5f__5f_5f_5f__5f_5f_5f_5f_5f_5f_5f_Title_5f_5f_5f_5f_5f_5f_5f_20_5f_5f_5f_5f_5f_5f_5f_and_5f_5f_5f_5f_5f_5f_5f_20_5f_5f_5f_5f_5f_5f_5f_Content" presentation:presentation-page-layout-name="AL1">
        <draw:frame xml:id="id6" draw:id="id6" draw:name="object 12" draw:text-style-name="P18" draw:layer="layout" presentation:style-name="pr5" presentation:class="page-number" presentation:placeholder="true" svg:width="2.198cm" svg:height="1.525cm" svg:x="30.56cm" svg:y="17.28cm">
          <draw:text-box fo:min-height="1.525cm">
            <text:p text:style-name="P19"><text:span text:style-name="T15">2</text:span></text:p>
          </draw:text-box>
        </draw:frame>
        <draw:frame xml:id="id7" draw:id="id7" draw:name="object 2" draw:text-style-name="P20" draw:layer="layout" presentation:style-name="pr6" presentation:class="title" presentation:placeholder="true" svg:width="28.78cm" svg:height="3.158cm" svg:x="0cm" svg:y="0cm">
          <draw:text-box fo:min-height="3.158cm">
            <text:p text:style-name="P21"><text:span text:style-name="T16">Постановка</text:span><text:span text:style-name="T17"><text:s/></text:span><text:span text:style-name="T18">цели и </text:span><text:span text:style-name="T19">задач</text:span></text:p>
          </draw:text-box>
        </draw:frame>
        <draw:frame xml:id="id8" draw:id="id8" draw:name="object 3" draw:style-name="gr3" svg:width="30.47cm" svg:height="2.068cm" svg:x="2.548cm" svg:y="4.133cm">
          <draw:text-box fo:min-height="2.068cm">
            <text:p text:style-name="P22"><text:span text:style-name="T20">Цель:</text:span><text:span text:style-name="T21"><text:s/></text:span><text:span text:style-name="T22">Разработка библиотеки для автоматической генерации мапперов с использованием KSP</text:span></text:p>
          </draw:text-box>
        </draw:frame>
        <draw:frame xml:id="id9" draw:id="id9" draw:name="TextBox 13" draw:style-name="gr4" svg:width="29.98cm" svg:height="7.363cm" svg:x="2.548cm" svg:y="7.408cm">
          <draw:text-box fo:min-height="7.363cm">
            <text:p text:style-name="P23"><text:span text:style-name="T23">Задачи:</text:span></text:p>
            <text:list text:style-name="L8" text:continue-numbering="true">
              <text:list-item>
                <text:p text:style-name="P24"><text:span text:style-name="T24">Изучить KSP и KotlinPoet</text:span></text:p>
              </text:list-item>
            </text:list>
            <text:p text:style-name="P25"><text:span text:style-name="T25">2. Создать аннотацию @CastCastleMapper</text:span></text:p>
            <text:p text:style-name="P26"><text:span text:style-name="T26">3. Реализовать KSP-процессор (анализ символов, построение моделей)</text:span></text:p>
            <text:p text:style-name="P27"><text:span text:style-name="T27">4. Добавить поддержку вложенных объектов и коллекций</text:span></text:p>
            <text:p text:style-name="P28"><text:span text:style-name="T28">5. Провести комплексное тестирование</text:span><text:span text:style-name="T29"> с помощью краевых примеров и тестов</text:span></text:p>
          </draw:text-box>
        </draw:frame>
        <presentation:notes draw:style-name="dp8">
          <draw:frame xml:id="id10" draw:id="id10" draw:text-style-name="P29" draw:layer="layout" presentation:style-name="pr7" presentation:class="outline" presentation:placeholder="true" svg:width="16.8cm" svg:height="13.36cm" svg:x="2.1cm" svg:y="14.11cm">
            <draw:text-box fo:min-height="13.36cm">
              <text:p text:style-name="P30"><text:span/></text:p>
            </draw:text-box>
          </draw:frame>
        </presentation:notes>
      </draw:page>
      <draw:page draw:name="Этапы реализации" draw:style-name="dp11" draw:master-page-name="______5f__5f_5f_5f__5f_5f_5f__5f_5f_5f__5f_5f_5f_5f_5f_5f_5f_Title_5f_5f_5f_5f_5f_5f_5f_20_5f_5f_5f_5f_5f_5f_5f_Only" presentation:presentation-page-layout-name="AL2">
        <draw:frame xml:id="id13" draw:id="id13" draw:name="object 2" draw:text-style-name="P35" draw:layer="layout" presentation:style-name="pr10" presentation:class="title" presentation:placeholder="true" svg:width="28.77cm" svg:height="3.158cm" svg:x="0.09399cm" svg:y="0.4cm">
          <draw:text-box fo:min-height="3.158cm">
            <text:p text:style-name="P36"><text:span text:style-name="T30">Этапы реализации</text:span></text:p>
          </draw:text-box>
        </draw:frame>
        <draw:frame xml:id="id14" draw:id="id14" draw:name="object 4" draw:text-style-name="P37" draw:layer="layout" presentation:style-name="pr11" presentation:class="page-number" presentation:placeholder="true" svg:width="1.778cm" svg:height="1.349cm" svg:x="30.94cm" svg:y="17.52cm">
          <draw:text-box fo:min-height="1.349cm">
            <text:p text:style-name="P38"><text:span text:style-name="T31"><text:page-number>&lt;number&gt;</text:page-number></text:span></text:p>
          </draw:text-box>
        </draw:frame>
        <draw:frame xml:id="id15" draw:id="id15" draw:style-name="gr5" svg:width="31.46cm" svg:height="12.24cm" svg:x="0.7008cm" svg:y="4.067cm">
          <draw:image xlink:href="Pictures/image1.png" xlink:type="simple" xlink:show="embed" xlink:actuate="onLoad"/>
        </draw:frame>
        <presentation:notes draw:style-name="dp12">
          <draw:frame xml:id="id16" draw:id="id16" draw:text-style-name="P39" draw:layer="layout" presentation:style-name="pr12" presentation:class="outline" presentation:placeholder="true" svg:width="16.8cm" svg:height="13.36cm" svg:x="2.1cm" svg:y="14.11cm">
            <draw:text-box fo:min-height="13.36cm">
              <text:p text:style-name="P40"><text:span/></text:p>
            </draw:text-box>
          </draw:frame>
        </presentation:notes>
      </draw:page>
      <draw:page draw:name="Этапы реализации" draw:style-name="dp13" draw:master-page-name="______5f__5f_5f_5f__5f_5f_5f__5f_5f_5f__5f_5f_5f_5f_5f_5f_5f_Title_5f_5f_5f_5f_5f_5f_5f_20_5f_5f_5f_5f_5f_5f_5f_Only" presentation:presentation-page-layout-name="AL2">
        <draw:frame xml:id="id17" draw:id="id17" draw:name="object 2" draw:text-style-name="P41" draw:layer="layout" presentation:style-name="pr13" presentation:class="title" presentation:placeholder="true" svg:width="28.83cm" svg:height="3.158cm" svg:x="0.09399cm" svg:y="0.4cm">
          <draw:text-box fo:min-height="3.158cm">
            <text:p text:style-name="P42"><text:span text:style-name="T32">Функциональность библиотеки</text:span></text:p>
          </draw:text-box>
        </draw:frame>
        <draw:frame xml:id="id18" draw:id="id18" draw:name="object 4" draw:text-style-name="P43" draw:layer="layout" presentation:style-name="pr14" presentation:class="page-number" presentation:placeholder="true" svg:width="1.777cm" svg:height="1.525cm" svg:x="31.08cm" svg:y="17.43cm">
          <draw:text-box fo:min-height="1.525cm">
            <text:p text:style-name="P44"><text:span text:style-name="T33">4</text:span></text:p>
          </draw:text-box>
        </draw:frame>
        <draw:frame xml:id="id19" draw:id="id19" draw:style-name="gr6" svg:width="29.19cm" svg:height="10.42cm" svg:x="0.643cm" svg:y="5.292cm">
          <draw:text-box fo:min-height="10.42cm">
            <text:list text:style-name="L16" text:continue-numbering="true">
              <text:list-item>
                <text:p text:style-name="P45"><text:span text:style-name="T34">Аннотация @CastCastleMapper</text:span></text:p>
              </text:list-item>
            </text:list>
            <text:list text:style-name="L17" text:continue-numbering="true">
              <text:list-item>
                <text:p text:style-name="P46"><text:span text:style-name="T35">Автоматическое добавление недостающих параметров</text:span></text:p>
              </text:list-item>
            </text:list>
            <text:list text:style-name="L18" text:continue-numbering="true">
              <text:list-item>
                <text:p text:style-name="P47"><text:span text:style-name="T36">Рекурсивная обработка вложенных объектов</text:span></text:p>
              </text:list-item>
            </text:list>
            <text:list text:style-name="L19" text:continue-numbering="true">
              <text:list-item>
                <text:p text:style-name="P48"><text:span text:style-name="T37">Поддержка коллекций</text:span></text:p>
              </text:list-item>
            </text:list>
            <text:list text:style-name="L20" text:continue-numbering="true">
              <text:list-item>
                <text:p text:style-name="P49"><text:span text:style-name="T38">Функции расширения – приёмник this используется как исходный объект.</text:span></text:p>
              </text:list-item>
            </text:list>
            <text:list text:style-name="L21" text:continue-numbering="true">
              <text:list-item>
                <text:p text:style-name="P50"><text:span text:style-name="T39">Работа с companion-объектами – аннотация работает внутри companion object.</text:span></text:p>
              </text:list-item>
            </text:list>
            <text:list text:style-name="L22" text:continue-numbering="true">
              <text:list-item>
                <text:p text:style-name="P51"><text:span text:style-name="T40">Полное отсутствие рефлексии – вся генерация на этапе компиляции, высокая производительность и совместимость с ProGuard.</text:span></text:p>
              </text:list-item>
            </text:list>
          </draw:text-box>
        </draw:frame>
        <presentation:notes draw:style-name="dp14">
          <draw:frame xml:id="id20" draw:id="id20" draw:text-style-name="P52" draw:layer="layout" presentation:style-name="pr15" presentation:class="outline" presentation:placeholder="true" svg:width="16.8cm" svg:height="13.36cm" svg:x="2.1cm" svg:y="14.11cm">
            <draw:text-box fo:min-height="13.36cm">
              <text:p text:style-name="P53"><text:span/></text:p>
            </draw:text-box>
          </draw:frame>
        </presentation:notes>
      </draw:page>
      <draw:page draw:name="Пользовательский интерфейс" draw:style-name="dp15" draw:master-page-name="______5f__5f_5f_5f__5f_5f_5f__5f_5f_5f__5f_5f_5f_5f_5f_5f_5f_Title_5f_5f_5f_5f_5f_5f_5f_20_5f_5f_5f_5f_5f_5f_5f_Only" presentation:presentation-page-layout-name="AL2">
        <draw:frame xml:id="id21" draw:id="id21" draw:name="object 2" draw:text-style-name="P54" draw:layer="layout" presentation:style-name="pr16" presentation:class="title" presentation:placeholder="true" svg:width="28.82cm" svg:height="3.158cm" svg:x="0cm" svg:y="0.015cm">
          <draw:text-box fo:min-height="3.158cm">
            <text:p text:style-name="P55"><text:span text:style-name="T41">Диаграмма классов библиотеки</text:span></text:p>
          </draw:text-box>
        </draw:frame>
        <draw:frame xml:id="id22" draw:id="id22" draw:name="TextBox 2" draw:style-name="gr7" svg:width="1.208cm" svg:height="1.775cm" svg:x="31.68cm" svg:y="17.25cm">
          <draw:text-box fo:min-height="1.775cm">
            <text:p text:style-name="P56"><text:span text:style-name="T42">5</text:span></text:p>
          </draw:text-box>
        </draw:frame>
        <draw:frame xml:id="id23" draw:id="id23" draw:style-name="gr8" svg:width="28.51cm" svg:height="13.99cm" svg:x="2.321cm" svg:y="3.618cm">
          <draw:image xlink:href="Pictures/image2.png" xlink:type="simple" xlink:show="embed" xlink:actuate="onLoad"/>
        </draw:frame>
        <presentation:notes draw:style-name="dp16">
          <draw:frame xml:id="id24" draw:id="id24" draw:text-style-name="P57" draw:layer="layout" presentation:style-name="pr17" presentation:class="outline" presentation:placeholder="true" svg:width="16.8cm" svg:height="13.36cm" svg:x="2.1cm" svg:y="14.11cm">
            <draw:text-box fo:min-height="13.36cm">
              <text:p text:style-name="P58"><text:span/></text:p>
            </draw:text-box>
          </draw:frame>
        </presentation:notes>
      </draw:page>
      <draw:page draw:name="Заключение" draw:style-name="dp17" draw:master-page-name="______5f__5f_5f_5f__5f_5f_5f__5f_5f_5f__5f_5f_5f_5f_5f_5f_5f_Title_5f_5f_5f_5f_5f_5f_5f_20_5f_5f_5f_5f_5f_5f_5f_and_5f_5f_5f_5f_5f_5f_5f_20_5f_5f_5f_5f_5f_5f_5f_Content" presentation:presentation-page-layout-name="AL1">
        <draw:frame xml:id="id25" draw:id="id25" draw:name="object 2" draw:text-style-name="P59" draw:layer="layout" presentation:style-name="pr18" presentation:class="title" presentation:placeholder="true" svg:width="28.77cm" svg:height="3.158cm" svg:x="-0.002236cm" svg:y="0.4cm">
          <draw:text-box fo:min-height="3.158cm">
            <text:p text:style-name="P60"><text:span text:style-name="T43">Заключение</text:span></text:p>
          </draw:text-box>
        </draw:frame>
        <draw:frame xml:id="id26" draw:id="id26" draw:name="object 3" draw:style-name="gr9" svg:width="31.96cm" svg:height="13.32cm" svg:x="1.129cm" svg:y="4.632cm">
          <draw:text-box fo:min-height="13.32cm">
            <text:p text:style-name="P61"><text:span text:style-name="T44">В ходе производственной практики </text:span><text:span text:style-name="T45">были выполнены следующие задачи:</text:span></text:p>
            <text:p text:style-name="P62"><text:span text:style-name="T45"/></text:p>
            <text:p text:style-name="P63"><text:span text:style-name="T46">1. Изучены KSP и KotlinPoet – освоены механизмы </text:span><text:span text:style-name="T47">обработки </text:span><text:span text:style-name="T48">символов, генерации файлов и программного создания исходного кода.<text:s text:c="2"/></text:span></text:p>
            <text:p text:style-name="P64"><text:span text:style-name="T49">2. Создана аннотация @CastCastleMapper.<text:s text:c="2"/></text:span></text:p>
            <text:p text:style-name="P65"><text:span text:style-name="T50">3. Реализован KSP-процессор – выполняет анализ символов, строит внутренние модели данных</text:span></text:p>
            <text:p text:style-name="P66"><text:span text:style-name="T51">4. Добавлена поддержка вложенных объектов и коллекций</text:span></text:p>
            <text:p text:style-name="P67"><text:span text:style-name="T52">5. Проведено комплексное тестирование на краевых примерах (вложенность, коллекции, доп. параметры, companion-объект).</text:span></text:p>
            <text:p text:style-name="P68"><text:span text:style-name="T52"/></text:p>
            <text:p text:style-name="P69"><text:span text:style-name="T53">*Ключевое отличие от аналогов: автоматическое добавление отсутствующих параметров</text:span></text:p>
          </draw:text-box>
        </draw:frame>
        <presentation:notes draw:style-name="dp18">
          <draw:frame xml:id="id27" draw:id="id27" draw:text-style-name="P70" draw:layer="layout" presentation:style-name="pr19" presentation:class="outline" presentation:placeholder="true" svg:width="16.8cm" svg:height="13.36cm" svg:x="2.1cm" svg:y="14.11cm">
            <draw:text-box fo:min-height="13.36cm">
              <text:p text:style-name="P71"><text:span/></text:p>
            </draw:text-box>
          </draw:frame>
        </presentation:notes>
      </draw:page>
      <draw:page draw:name="Спасибо за внимание!" draw:style-name="dp19" draw:master-page-name="______5f__5f_5f_5f__5f_5f_5f__5f_5f_5f__5f_5f_5f_5f_5f_5f_5f_Title_5f_5f_5f_5f_5f_5f_5f_20_5f_5f_5f_5f_5f_5f_5f_Only" presentation:presentation-page-layout-name="AL2">
        <draw:frame xml:id="id28" draw:id="id28" draw:name="object 2" draw:text-style-name="P72" draw:layer="layout" presentation:style-name="pr20" presentation:class="title" presentation:placeholder="true" svg:width="20.99cm" svg:height="3.213cm" svg:x="6.44cm" svg:y="7.612cm">
          <draw:text-box fo:min-height="3.213cm">
            <text:p text:style-name="P73"><text:span text:style-name="T54">Спасибо</text:span><text:span text:style-name="T55"><text:s/></text:span><text:span text:style-name="T56">за</text:span><text:span text:style-name="T57"><text:s/></text:span><text:span text:style-name="T58">внимание!</text:span></text:p>
          </draw:text-box>
        </draw:frame>
        <presentation:notes draw:style-name="dp20">
          <draw:frame xml:id="id29" draw:id="id29" draw:text-style-name="P74" draw:layer="layout" presentation:style-name="pr21" presentation:class="outline" presentation:placeholder="true" svg:width="16.8cm" svg:height="13.36cm" svg:x="2.1cm" svg:y="14.11cm">
            <draw:text-box fo:min-height="13.36cm">
              <text:p text:style-name="P75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9">
      <style:drawing-page-properties draw:fill-color="#FFFFFF" draw:fill="solid"/>
    </style:style>
    <style:style style:family="presentation" style:name="pr8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/>
      <style:text-properties/>
    </style:style>
    <style:style style:family="presentation" style:name="pr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drawing-page" style:name="dp10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____5f__5f_5f_5f__5f_5f_5f__5f_5f_5f__5f_5f_5f_5f_5f_5f_5f_Title_5f_5f_5f_5f_5f_5f_5f_20_5f_5f_5f_5f_5f_5f_5f_and_5f_5f_5f_5f_5f_5f_5f_20_5f_5f_5f_5f_5f_5f_5f_Content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____5f__5f_5f_5f__5f_5f_5f__5f_5f_5f__5f_5f_5f_5f_5f_5f_5f_Title_5f_5f_5f_5f_5f_5f_5f_20_5f_5f_5f_5f_5f_5f_5f_Only" style:page-layout-name="Mpm3" draw:style-name="dp9">
      <presentation:notes draw:style-name="dp10" style:page-layout-name="Mpm4"/>
      <draw:frame xml:id="id11" draw:id="id11" draw:name="place_holder" draw:text-style-name="P31" draw:layer="backgroundobjects" presentation:style-name="pr8" presentation:class="title" presentation:placeholder="false" presentation:user-transformed="true" svg:width="23.91cm" svg:height="3.507cm" svg:x="2.058cm" svg:y="1.743cm">
        <draw:text-box fo:min-height="3.507cm">
          <text:p text:style-name="P32"><text:span/></text:p>
        </draw:text-box>
      </draw:frame>
      <draw:frame xml:id="id12" draw:id="id12" draw:name="place_holder" draw:text-style-name="P33" draw:layer="backgroundobjects" presentation:style-name="pr9" presentation:class="outline" presentation:placeholder="false" presentation:user-transformed="true" svg:width="23.91cm" svg:height="13.23cm" svg:x="2.058cm" svg:y="5.838cm">
        <draw:text-box fo:min-height="13.23cm">
          <text:p text:style-name="P34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