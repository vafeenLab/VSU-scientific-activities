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padding-top="8.305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58.38pt" fo:text-align="center" fo:margin-left="1.049pt" fo:margin-right="0.3968pt" fo:text-indent="-0.05638pt" fo:margin-top="8.3pt" fo:margin-bottom="0pt"/>
      <style:text-properties/>
    </style:style>
    <style:style style:family="text" style:name="T1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2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3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11">
      <style:paragraph-properties fo:line-height="100%" fo:text-align="right" fo:margin-left="0pt" fo:margin-right="0pt" fo:text-indent="0pt" fo:margin-top="15.99pt" fo:margin-bottom="0pt"/>
      <style:text-properties/>
    </style:style>
    <style:style style:family="paragraph" style:name="P12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4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paragraph" style:name="P13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5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6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7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8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9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0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11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2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13">
      <style:text-properties style:text-line-through-type="none" fo:font-family="Arial" style:font-family-complex="Arial" fo:font-size="24pt" style:font-size-asian="24pt" style:font-size-complex="24pt" fo:letter-spacing="-0.11pt" style:text-underline-type="none"/>
    </style:style>
    <style:style style:family="text" style:name="T14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paragraph" style:name="P14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5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6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paragraph" style:name="P15">
      <style:paragraph-properties fo:line-height="100%" fo:text-align="right" fo:margin-left="0pt" fo:margin-right="0.8502pt" fo:text-indent="0pt" fo:margin-top="0pt" fo:margin-bottom="0pt"/>
      <style:text-properties/>
    </style:style>
    <style:style style:family="paragraph" style:name="P16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7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paragraph" style:name="P17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8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19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0">
      <style:text-properties style:text-line-through-type="none"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1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2">
      <style:text-properties style:text-line-through-type="none"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3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4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5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6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">
      <style:paragraph-properties/>
      <style:text-properties/>
    </style:style>
    <style:style style:family="paragraph" style:name="P19">
      <style:paragraph-properties/>
      <style:text-properties/>
    </style:style>
    <style:style style:family="drawing-page" style:name="dp7">
      <style:drawing-page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0">
      <style:paragraph-properties/>
      <style:text-properties/>
    </style:style>
    <style:style style:family="paragraph" style:name="P21">
      <style:paragraph-properties fo:text-align="right"/>
      <style:text-properties/>
    </style:style>
    <style:style style:family="text" style:name="T27">
      <style:text-properties style:text-line-through-type="none" fo:font-size="36pt" style:font-size-asian="36pt" style:font-size-complex="36pt" fo:language="ru" fo:country="RU"/>
    </style:style>
    <style:style style:family="presentation" style:name="pr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22">
      <style:paragraph-properties/>
      <style:text-properties/>
    </style:style>
    <style:style style:family="paragraph" style:name="P2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28">
      <style:text-properties fo:color="#000000" fo:font-family="Arial" style:font-family-complex="Arial" fo:font-size="44pt" style:font-size-asian="44pt" style:font-size-complex="44pt" style:text-underline-type="none" fo:font-weight="bold"/>
    </style:style>
    <style:style style:family="text" style:name="T29">
      <style:text-properties fo:color="#000000" fo:font-family="Arial" style:font-family-complex="Arial" fo:font-size="44pt" style:font-size-asian="44pt" style:font-size-complex="44pt" fo:letter-spacing="-2.86pt" style:text-underline-type="none" fo:font-weight="bold"/>
    </style:style>
    <style:style style:family="text" style:name="T30">
      <style:text-properties fo:color="#000000" fo:font-family="Arial" style:font-family-complex="Arial" fo:font-size="44pt" style:font-size-asian="44pt" style:font-size-complex="44pt" fo:letter-spacing="-0.11pt" fo:language="ru" fo:country="RU" style:text-underline-type="none" fo:font-weight="bold"/>
    </style:style>
    <style:style style:family="text" style:name="T31">
      <style:text-properties fo:color="#000000" fo:font-family="Arial" style:font-family-complex="Arial" fo:font-size="44pt" style:font-size-asian="44pt" style:font-size-complex="44pt" fo:letter-spacing="-0.11pt" style:text-underline-type="none" fo:font-weight="bold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24">
      <style:paragraph-properties fo:line-height="100%" fo:text-align="left" fo:margin-left="0.992pt" fo:margin-right="0pt" fo:text-indent="0pt" fo:margin-top="0.99pt" fo:margin-bottom="0pt"/>
      <style:text-properties/>
    </style:style>
    <style:style style:family="text" style:name="T32">
      <style:text-properties style:text-line-through-type="none" fo:font-family="Arial" style:font-family-complex="Arial" fo:font-size="24pt" style:font-size-asian="24pt" style:font-size-complex="24pt" fo:letter-spacing="-0.11pt" style:text-underline-type="none" fo:font-weight="bold"/>
    </style:style>
    <style:style style:family="text" style:name="T33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 fo:font-weight="bold"/>
    </style:style>
    <style:style style:family="text" style:name="T34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35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6">
      <style:text-properties style:text-line-through-type="none"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26">
      <style:paragraph-properties fo:line-height="100%" fo:text-align="left" fo:margin-left="0pt" fo:margin-right="0pt" fo:text-indent="0pt" fo:margin-top="11.88pt" fo:margin-bottom="9.92pt"/>
      <style:text-properties/>
    </style:style>
    <style:style style:family="text" style:name="T37">
      <style:text-properties fo:font-size="24pt" style:font-size-asian="24pt" style:font-size-complex="24pt"/>
    </style:style>
    <style:style style:family="text" style:name="T38">
      <style:text-properties fo:font-size="24pt" style:font-size-asian="24pt" style:font-size-complex="24pt" fo:language="ru" fo:country="RU"/>
    </style:style>
    <style:style style:family="paragraph" style:name="P2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39">
      <style:text-properties fo:font-size="24pt" style:font-size-asian="24pt" style:font-size-complex="24pt"/>
    </style:style>
    <style:style style:family="text" style:name="T40">
      <style:text-properties fo:font-size="24pt" style:font-size-asian="24pt" style:font-size-complex="24pt" fo:language="ru" fo:country="RU"/>
    </style:style>
    <style:style style:family="paragraph" style:name="P2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1">
      <style:text-properties fo:font-size="24pt" style:font-size-asian="24pt" style:font-size-complex="24pt"/>
    </style:style>
    <style:style style:family="text" style:name="T42">
      <style:text-properties fo:font-size="24pt" style:font-size-asian="24pt" style:font-size-complex="24pt" fo:language="ru" fo:country="RU"/>
    </style:style>
    <style:style style:family="paragraph" style:name="P2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3">
      <style:text-properties fo:font-size="24pt" style:font-size-asian="24pt" style:font-size-complex="24pt"/>
    </style:style>
    <style:style style:family="text" style:name="T44">
      <style:text-properties fo:font-size="24pt" style:font-size-asian="24pt" style:font-size-complex="24pt" fo:language="ru" fo:country="RU"/>
    </style:style>
    <style:style style:family="paragraph" style:name="P30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5">
      <style:text-properties fo:font-size="24pt" style:font-size-asian="24pt" style:font-size-complex="24pt"/>
    </style:style>
    <style:style style:family="text" style:name="T46">
      <style:text-properties fo:font-size="24pt" style:font-size-asian="24pt" style:font-size-complex="24pt" fo:language="ru" fo:country="RU"/>
    </style:style>
    <style:style style:family="text" style:name="T47">
      <style:text-properties fo:font-size="24pt" style:font-size-asian="24pt" style:font-size-complex="24pt"/>
    </style:style>
    <style:style style:family="text" style:name="T48">
      <style:text-properties fo:font-size="24pt" style:font-size-asian="24pt" style:font-size-complex="24pt" fo:language="ru" fo:country="RU"/>
    </style:style>
    <style:style style:family="drawing-page" style:name="dp8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/>
      <style:text-properties/>
    </style:style>
    <style:style style:family="drawing-page" style:name="dp11">
      <style:drawing-page-properties/>
    </style:style>
    <style:style style:family="presentation" style:name="pr1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37">
      <style:paragraph-properties/>
      <style:text-properties/>
    </style:style>
    <style:style style:family="paragraph" style:name="P3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49">
      <style:text-properties fo:color="#000000" fo:font-family="Arial Black" style:font-family-complex="Arial Black" fo:font-size="44pt" style:font-size-asian="44pt" style:font-size-complex="44pt" fo:letter-spacing="-0.11pt" fo:language="ru" fo:country="RU" style:text-underline-type="none" fo:font-weight="bold"/>
    </style:style>
    <style:style style:family="presentation" style:name="pr11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39">
      <style:paragraph-properties/>
      <style:text-properties/>
    </style:style>
    <style:style style:family="paragraph" style:name="P40">
      <style:paragraph-properties fo:line-height="38.21pt" fo:text-align="right" fo:margin-left="24.55pt" fo:margin-right="0pt" fo:text-indent="0pt" fo:margin-top="0pt" fo:margin-bottom="0pt"/>
      <style:text-properties/>
    </style:style>
    <style:style style:family="text" style:name="T50">
      <style:text-properties fo:font-family="Arial" style:font-family-asian="Arial" style:font-family-complex="Arial" fo:font-size="36pt" style:font-size-asian="36pt" style:font-size-complex="36pt"/>
    </style:style>
    <style:style style:parent-style-name="Graphics" style:family="graphic" style:name="gr5">
      <style:graphic-properties draw:image-opacity="100%" style:repeat="stretch" draw:stroke="none" style:wrap="run-through" fo:background-color="transparent"/>
    </style:style>
    <style:style style:family="drawing-page" style:name="dp12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1">
      <style:paragraph-properties/>
      <style:text-properties/>
    </style:style>
    <style:style style:family="paragraph" style:name="P42">
      <style:paragraph-properties/>
      <style:text-properties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43">
      <style:paragraph-properties/>
      <style:text-properties/>
    </style:style>
    <style:style style:family="paragraph" style:name="P44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1">
      <style:text-properties fo:font-family="Liberation Sans" style:font-family-complex="Liberation Sans" fo:font-size="44pt" style:font-size-asian="44pt" style:font-size-complex="44pt" fo:language="ru" fo:country="RU" style:text-underline-type="none" fo:font-weight="bold"/>
    </style:style>
    <style:style style:family="presentation" style:name="pr14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45">
      <style:paragraph-properties/>
      <style:text-properties/>
    </style:style>
    <style:style style:family="paragraph" style:name="P46">
      <style:paragraph-properties fo:text-align="right"/>
      <style:text-properties/>
    </style:style>
    <style:style style:family="text" style:name="T52">
      <style:text-properties fo:font-size="36pt" style:font-size-asian="36pt" style:font-size-complex="36pt"/>
    </style:style>
    <style:style style:family="graphic" style:name="gr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7">
      <style:paragraph-properties fo:margin-left="0.992pt" fo:margin-right="0pt"/>
      <style:text-properties/>
    </style:style>
    <style:style style:family="text" style:name="T53">
      <style:text-properties fo:color="#000000" fo:font-family="Arial" style:font-family-complex="Arial" fo:font-size="24pt" style:font-size-asian="24pt" style:font-size-complex="24pt" style:text-underline-type="none"/>
    </style:style>
    <style:style style:family="paragraph" style:name="P48">
      <style:paragraph-properties fo:margin-left="0.992pt" fo:margin-right="0pt"/>
      <style:text-properties/>
    </style:style>
    <style:style style:family="text" style:name="T54">
      <style:text-properties fo:color="#000000" fo:font-family="Arial" style:font-family-complex="Arial" fo:font-size="24pt" style:font-size-asian="24pt" style:font-size-complex="24pt" style:text-underline-type="none"/>
    </style:style>
    <style:style style:family="paragraph" style:name="P49">
      <style:paragraph-properties fo:margin-left="0.992pt" fo:margin-right="0pt"/>
      <style:text-properties/>
    </style:style>
    <style:style style:family="text" style:name="T55">
      <style:text-properties fo:color="#000000" fo:font-family="Arial" style:font-family-complex="Arial" fo:font-size="24pt" style:font-size-asian="24pt" style:font-size-complex="24pt" style:text-underline-type="none"/>
    </style:style>
    <style:style style:family="paragraph" style:name="P50">
      <style:paragraph-properties fo:margin-left="0.992pt" fo:margin-right="0pt"/>
      <style:text-properties/>
    </style:style>
    <style:style style:family="text" style:name="T56">
      <style:text-properties fo:color="#000000" fo:font-family="Arial" style:font-family-complex="Arial" fo:font-size="24pt" style:font-size-asian="24pt" style:font-size-complex="24pt" style:text-underline-type="none"/>
    </style:style>
    <style:style style:family="paragraph" style:name="P51">
      <style:paragraph-properties fo:margin-left="0.992pt" fo:margin-right="0pt"/>
      <style:text-properties/>
    </style:style>
    <style:style style:family="text" style:name="T57">
      <style:text-properties fo:color="#000000" fo:font-family="Arial" style:font-family-complex="Arial" fo:font-size="24pt" style:font-size-asian="24pt" style:font-size-complex="24pt" style:text-underline-type="none"/>
    </style:style>
    <style:style style:family="paragraph" style:name="P52">
      <style:paragraph-properties fo:margin-left="0.992pt" fo:margin-right="0pt"/>
      <style:text-properties/>
    </style:style>
    <style:style style:family="text" style:name="T58">
      <style:text-properties fo:color="#000000" fo:font-family="Arial" style:font-family-complex="Arial" fo:font-size="24pt" style:font-size-asian="24pt" style:font-size-complex="24pt" style:text-underline-type="none" fo:font-weight="bold"/>
    </style:style>
    <style:style style:family="text" style:name="T59">
      <style:text-properties fo:color="#000000" fo:font-family="Arial" style:font-family-complex="Arial" fo:font-size="24pt" style:font-size-asian="24pt" style:font-size-complex="24pt" style:text-underline-type="none"/>
    </style:style>
    <style:style style:family="text" style:name="T60">
      <style:text-properties fo:color="#000000" fo:font-family="Arial" style:font-family-complex="Arial" fo:font-size="24pt" style:font-size-asian="24pt" style:font-size-complex="24pt" fo:language="ru" fo:country="RU" style:text-underline-type="none"/>
    </style:style>
    <style:style style:family="drawing-page" style:name="dp14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3">
      <style:paragraph-properties/>
      <style:text-properties/>
    </style:style>
    <style:style style:family="paragraph" style:name="P54">
      <style:paragraph-properties/>
      <style:text-properties/>
    </style:style>
    <style:style style:family="drawing-page" style:name="dp15">
      <style:drawing-page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55">
      <style:paragraph-properties/>
      <style:text-properties/>
    </style:style>
    <style:style style:family="paragraph" style:name="P56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61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62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63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64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65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66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67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68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69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70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71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72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73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74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75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76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77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7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5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78">
      <style:text-properties style:text-line-through-type="none" fo:font-family="Arial" style:font-family-complex="Arial" fo:font-size="36pt" style:font-size-asian="36pt" style:font-size-complex="36pt" fo:language="en" fo:country="US" style:text-underline-type="none"/>
    </style:style>
    <style:style style:parent-style-name="Graphics" style:family="graphic" style:name="gr8">
      <style:graphic-properties style:repeat="stretch" draw:stroke="none" style:wrap="run-through" fo:background-color="transparent"/>
    </style:style>
    <style:style style:parent-style-name="Graphics" style:family="graphic" style:name="gr9">
      <style:graphic-properties style:repeat="stretch" draw:stroke="none" style:wrap="run-through" fo:background-color="transparent"/>
    </style:style>
    <style:style style:parent-style-name="Graphics" style:family="graphic" style:name="gr10">
      <style:graphic-properties style:repeat="stretch" draw:stroke="none" style:wrap="run-through" fo:background-color="transparent"/>
    </style:style>
    <style:style style:parent-style-name="Graphics" style:family="graphic" style:name="gr11">
      <style:graphic-properties style:repeat="stretch" draw:stroke="none" style:wrap="run-through" fo:background-color="transparent"/>
    </style:style>
    <style:style style:parent-style-name="Graphics" style:family="graphic" style:name="gr12">
      <style:graphic-properties draw:image-opacity="100%" style:repeat="stretch" draw:stroke="none" style:wrap="run-through" fo:background-color="transparent"/>
    </style:style>
    <style:style style:family="drawing-page" style:name="dp16">
      <style:drawing-page-properties/>
    </style:style>
    <style:style style:family="presentation" style:name="pr1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8">
      <style:paragraph-properties/>
      <style:text-properties/>
    </style:style>
    <style:style style:family="paragraph" style:name="P59">
      <style:paragraph-properties/>
      <style:text-properties/>
    </style:style>
    <style:style style:family="drawing-page" style:name="dp17">
      <style:drawing-page-properties/>
    </style:style>
    <style:style style:family="presentation" style:name="pr18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0">
      <style:paragraph-properties/>
      <style:text-properties/>
    </style:style>
    <style:style style:family="paragraph" style:name="P61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79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80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81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13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6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82">
      <style:text-properties style:text-line-through-type="none" fo:font-family="Arial" style:font-family-complex="Arial" fo:font-size="36pt" style:font-size-asian="36pt" style:font-size-complex="36pt" fo:language="en" fo:country="US" style:text-underline-type="none"/>
    </style:style>
    <style:style style:parent-style-name="Graphics" style:family="graphic" style:name="gr14">
      <style:graphic-properties style:repeat="stretch" draw:stroke="none" style:wrap="run-through" fo:background-color="transparent"/>
    </style:style>
    <style:style style:parent-style-name="Graphics" style:family="graphic" style:name="gr15">
      <style:graphic-properties style:repeat="stretch" draw:stroke="none" style:wrap="run-through" fo:background-color="transparent"/>
    </style:style>
    <style:style style:parent-style-name="Graphics" style:family="graphic" style:name="gr16">
      <style:graphic-properties style:repeat="stretch" draw:stroke="none" style:wrap="run-through" fo:background-color="transparent"/>
    </style:style>
    <style:style style:parent-style-name="Graphics" style:family="graphic" style:name="gr17">
      <style:graphic-properties style:repeat="stretch" draw:stroke="none" style:wrap="run-through" fo:background-color="transparent"/>
    </style:style>
    <style:style style:parent-style-name="Graphics" style:family="graphic" style:name="gr18">
      <style:graphic-properties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1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63">
      <style:paragraph-properties/>
      <style:text-properties/>
    </style:style>
    <style:style style:family="paragraph" style:name="P64">
      <style:paragraph-properties/>
      <style:text-properties/>
    </style:style>
    <style:style style:family="drawing-page" style:name="dp19">
      <style:drawing-page-properties/>
    </style:style>
    <style:style style:family="presentation" style:name="pr2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5">
      <style:paragraph-properties/>
      <style:text-properties/>
    </style:style>
    <style:style style:family="paragraph" style:name="P66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3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19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67">
      <style:paragraph-properties fo:line-height="90%" fo:text-align="left" fo:margin-top="4.39pt" fo:margin-bottom="0pt"/>
      <style:text-properties/>
    </style:style>
    <style:style style:family="text" style:name="T84">
      <style:text-properties style:text-line-through-type="none"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68">
      <style:paragraph-properties fo:line-height="100%" fo:text-align="left" fo:margin-left="0pt" fo:margin-right="0pt" fo:text-indent="0pt" fo:margin-top="11.88pt" fo:margin-bottom="9.92pt"/>
      <style:text-properties/>
    </style:style>
    <style:style style:family="text" style:name="T85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86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87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88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89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90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91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paragraph" style:name="P6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92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93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94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95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96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paragraph" style:name="P70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97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98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99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100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01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paragraph" style:name="P71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02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103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04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105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06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107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08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109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10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111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12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paragraph" style:name="P72">
      <style:paragraph-properties fo:line-height="90%" fo:text-align="left" fo:margin-top="0pt" fo:margin-bottom="0pt"/>
      <style:text-properties/>
    </style:style>
    <style:style style:family="text" style:name="T113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114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15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text" style:name="T116">
      <style:text-properties fo:color="#000000"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17">
      <style:text-properties fo:color="#000000" style:text-line-through-type="none" fo:font-family="Arial" style:font-family-complex="Arial" fo:font-size="24pt" style:font-size-asian="24pt" style:font-size-complex="24pt" fo:language="en" fo:country="US" style:text-underline-type="none"/>
    </style:style>
    <style:style style:family="paragraph" style:name="P73">
      <style:paragraph-properties fo:line-height="90%" fo:text-align="left" fo:margin-top="4.39pt" fo:margin-bottom="0pt"/>
      <style:text-properties/>
    </style:style>
    <style:style style:family="paragraph" style:name="P74">
      <style:paragraph-properties fo:line-height="90%" fo:text-align="left" fo:margin-top="4.39pt" fo:margin-bottom="0pt"/>
      <style:text-properties/>
    </style:style>
    <style:style style:family="text" style:name="T118">
      <style:text-properties fo:color="#000000" fo:font-family="Arial" style:font-family-complex="Arial" fo:font-size="24pt" style:font-size-asian="24pt" style:font-size-complex="24pt" style:text-underline-type="none" fo:font-weight="bold"/>
    </style:style>
    <style:style style:family="text" style:name="T119">
      <style:text-properties fo:color="#000000" fo:font-family="Arial" style:font-family-complex="Arial" fo:font-size="24pt" style:font-size-asian="24pt" style:font-size-complex="24pt" style:text-underline-type="none"/>
    </style:style>
    <style:style style:family="text" style:name="T120">
      <style:text-properties fo:color="#000000" fo:font-family="Arial" style:font-family-complex="Arial" fo:font-size="24pt" style:font-size-asian="24pt" style:font-size-complex="24pt" style:text-underline-type="none" fo:font-weight="bold"/>
    </style:style>
    <style:style style:family="drawing-page" style:name="dp20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5">
      <style:paragraph-properties/>
      <style:text-properties/>
    </style:style>
    <style:style style:family="paragraph" style:name="P76">
      <style:paragraph-properties/>
      <style:text-properties/>
    </style:style>
    <style:style style:family="drawing-page" style:name="dp21">
      <style:drawing-page-properties/>
    </style:style>
    <style:style style:family="presentation" style:name="pr22">
      <style:graphic-properties draw:fill="none" draw:textarea-vertical-align="top" draw:auto-grow-height="true" draw:fit-to-size="false" style:shrink-to-fit="false" draw:stroke="none" style:wrap="run-through" fo:padding-top="0.9069pt" fo:padding-bottom="0pt" fo:padding-left="0pt" fo:padding-right="0pt" fo:background-color="transparent"/>
    </style:style>
    <style:style style:family="paragraph" style:name="P77">
      <style:paragraph-properties/>
      <style:text-properties/>
    </style:style>
    <style:style style:family="paragraph" style:name="P78">
      <style:paragraph-properties fo:line-height="100%" fo:text-align="left" fo:margin-left="0.992pt" fo:margin-right="0pt" fo:text-indent="0pt" fo:margin-top="0.91pt" fo:margin-bottom="0pt"/>
      <style:text-properties/>
    </style:style>
    <style:style style:family="text" style:name="T121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22">
      <style:text-properties fo:color="#000000" fo:font-family="Arial Black" style:font-family-complex="Arial Black" fo:font-size="44pt" style:font-size-asian="44pt" style:font-size-complex="44pt" fo:letter-spacing="-1.19pt" style:text-underline-type="none"/>
    </style:style>
    <style:style style:family="text" style:name="T123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24">
      <style:text-properties fo:color="#000000" fo:font-family="Arial Black" style:font-family-complex="Arial Black" fo:font-size="44pt" style:font-size-asian="44pt" style:font-size-complex="44pt" fo:letter-spacing="-0.95pt" style:text-underline-type="none"/>
    </style:style>
    <style:style style:family="text" style:name="T125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drawing-page" style:name="dp22">
      <style:drawing-page-properties/>
    </style:style>
    <style:style style:family="presentation" style:name="pr2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9">
      <style:paragraph-properties/>
      <style:text-properties/>
    </style:style>
    <style:style style:family="paragraph" style:name="P80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16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17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18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19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20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</office:automatic-styles>
  <office:body>
    <office:presentation>
      <draw:page draw:name="page1" draw:style-name="dp5" draw:master-page-name="____5f__5f_5f_5f__5f_5f_5f__5f_5f_5f__5f_5f_5f_5f_5f_5f_5f_Title_5f_5f_5f_5f_5f_5f_5f_20_5f_5f_5f_5f_5f_5f_5f_and_5f_5f_5f_5f_5f_5f_5f_20_5f_5f_5f_5f_5f_5f_5f_Content" presentation:presentation-page-layout-name="AL1">
        <draw:frame xml:id="id3" draw:id="id3" draw:name="object 2" draw:text-style-name="P9" draw:layer="layout" presentation:style-name="pr3" presentation:class="outline" presentation:placeholder="true" svg:width="33.65cm" svg:height="11.09cm" svg:x="0.106cm" svg:y="1.482cm">
          <draw:text-box fo:min-height="11.09cm">
            <text:p text:style-name="P10"><text:span text:style-name="T1">Разработка мобильного </text:span><text:span text:style-name="T2">приложения для фитнеса на </text:span><text:span text:style-name="T3">платформе Android</text:span></text:p>
          </draw:text-box>
        </draw:frame>
        <draw:frame xml:id="id4" draw:id="id4" draw:name="object 3" draw:style-name="gr2" svg:width="24.44cm" svg:height="7.148cm" svg:x="8.678cm" svg:y="10.1cm">
          <draw:text-box fo:min-height="7.148cm">
            <text:p text:style-name="P11"><text:span/></text:p>
            <text:p text:style-name="P12"><text:span text:style-name="T4">Выполнил</text:span></text:p>
            <text:p text:style-name="P13"><text:span text:style-name="T5">студент</text:span><text:span text:style-name="T6"><text:s/></text:span><text:span text:style-name="T7">4</text:span><text:span text:style-name="T8"><text:s/></text:span><text:span text:style-name="T9">курса</text:span><text:span text:style-name="T10"><text:s/></text:span><text:span text:style-name="T11">61</text:span><text:span text:style-name="T12"><text:s/></text:span><text:span text:style-name="T13">группы</text:span><text:span text:style-name="T14"><text:s/></text:span></text:p>
            <text:p text:style-name="P14"><text:span text:style-name="T15">Вафин А.Р</text:span><text:span text:style-name="T16">. </text:span></text:p>
            <text:p text:style-name="P15"><text:span/></text:p>
            <text:p text:style-name="P16"><text:span text:style-name="T17">Руководитель</text:span></text:p>
            <text:p text:style-name="P17"><text:span text:style-name="T18">к.ф.-</text:span><text:span text:style-name="T19">м.н.,</text:span><text:span text:style-name="T20"><text:s/></text:span><text:span text:style-name="T21">доц.</text:span><text:span text:style-name="T22"><text:s/></text:span><text:span text:style-name="T23">Болотова </text:span><text:span text:style-name="T24">С.</text:span><text:span text:style-name="T25"><text:s/></text:span><text:span text:style-name="T26">Ю.</text:span></text:p>
          </draw:text-box>
        </draw:frame>
        <presentation:notes draw:style-name="dp6">
          <draw:frame xml:id="id5" draw:id="id5" draw:text-style-name="P18" draw:layer="layout" presentation:style-name="pr4" presentation:class="outline" presentation:placeholder="true" svg:width="16.8cm" svg:height="13.36cm" svg:x="2.1cm" svg:y="14.11cm">
            <draw:text-box fo:min-height="13.36cm">
              <text:p text:style-name="P19"><text:span/></text:p>
            </draw:text-box>
          </draw:frame>
        </presentation:notes>
      </draw:page>
      <draw:page draw:name="Постановка задачи" draw:style-name="dp7" draw:master-page-name="____5f__5f_5f_5f__5f_5f_5f__5f_5f_5f__5f_5f_5f_5f_5f_5f_5f_Title_5f_5f_5f_5f_5f_5f_5f_20_5f_5f_5f_5f_5f_5f_5f_and_5f_5f_5f_5f_5f_5f_5f_20_5f_5f_5f_5f_5f_5f_5f_Content" presentation:presentation-page-layout-name="AL1">
        <draw:frame xml:id="id6" draw:id="id6" draw:name="object 12" draw:text-style-name="P20" draw:layer="layout" presentation:style-name="pr5" presentation:class="page-number" presentation:placeholder="true" svg:width="2.198cm" svg:height="1.525cm" svg:x="30.56cm" svg:y="17.28cm">
          <draw:text-box fo:min-height="1.525cm">
            <text:p text:style-name="P21"><text:span text:style-name="T27">2</text:span></text:p>
          </draw:text-box>
        </draw:frame>
        <draw:frame xml:id="id7" draw:id="id7" draw:name="object 2" draw:text-style-name="P22" draw:layer="layout" presentation:style-name="pr6" presentation:class="title" presentation:placeholder="true" svg:width="28.78cm" svg:height="3.158cm" svg:x="0cm" svg:y="0cm">
          <draw:text-box fo:min-height="3.158cm">
            <text:p text:style-name="P23"><text:span text:style-name="T28">Постановка</text:span><text:span text:style-name="T29"><text:s/></text:span><text:span text:style-name="T30">цели и </text:span><text:span text:style-name="T31">задач</text:span></text:p>
          </draw:text-box>
        </draw:frame>
        <draw:frame xml:id="id8" draw:id="id8" draw:name="object 3" draw:style-name="gr3" svg:width="30.47cm" svg:height="2.068cm" svg:x="2.548cm" svg:y="4.133cm">
          <draw:text-box fo:min-height="2.068cm">
            <text:p text:style-name="P24"><text:span text:style-name="T32">Цель:</text:span><text:span text:style-name="T33"><text:s/></text:span><text:span text:style-name="T34">р</text:span><text:span text:style-name="T35">азработка мобильного приложения для фитнеса на платформе Android</text:span></text:p>
          </draw:text-box>
        </draw:frame>
        <draw:frame xml:id="id9" draw:id="id9" draw:name="TextBox 13" draw:style-name="gr4" svg:width="29.88cm" svg:height="9.183cm" svg:x="2.548cm" svg:y="7.408cm">
          <draw:text-box fo:min-height="9.183cm">
            <text:p text:style-name="P25"><text:span text:style-name="T36">Задачи:</text:span></text:p>
            <text:p text:style-name="P26"><text:span text:style-name="T37">1. Разработка пользовательского интерфейса с интуитивной навигацией</text:span><text:span text:style-name="T38">.</text:span></text:p>
            <text:p text:style-name="P27"><text:span text:style-name="T39">2. Создание системы работы с данными и локальной базой</text:span><text:span text:style-name="T40"> данных.</text:span></text:p>
            <text:p text:style-name="P28"><text:span text:style-name="T41">3. Реализация бизнес-логики для тренировок и отслеживания прогресса</text:span><text:span text:style-name="T42">.</text:span></text:p>
            <text:p text:style-name="P29"><text:span text:style-name="T43">4. Проектирование и разработка серверного приложения (бэкенда)</text:span><text:span text:style-name="T44">.</text:span></text:p>
            <text:p text:style-name="P30"><text:span text:style-name="T45">5. Комплексное тестирование </text:span><text:span text:style-name="T46">мобильного приложения</text:span><text:span text:style-name="T47">, бэкенда и алгоритмов</text:span><text:span text:style-name="T48">.</text:span></text:p>
          </draw:text-box>
        </draw:frame>
        <presentation:notes draw:style-name="dp8">
          <draw:frame xml:id="id10" draw:id="id10" draw:text-style-name="P31" draw:layer="layout" presentation:style-name="pr7" presentation:class="outline" presentation:placeholder="true" svg:width="16.8cm" svg:height="13.36cm" svg:x="2.1cm" svg:y="14.11cm">
            <draw:text-box fo:min-height="13.36cm">
              <text:p text:style-name="P32"><text:span/></text:p>
            </draw:text-box>
          </draw:frame>
        </presentation:notes>
      </draw:page>
      <draw:page draw:name="Этапы реализации" draw:style-name="dp11" draw:master-page-name="____5f__5f_5f_5f__5f_5f_5f__5f_5f_5f__5f_5f_5f_5f_5f_5f_5f_Title_5f_5f_5f_5f_5f_5f_5f_20_5f_5f_5f_5f_5f_5f_5f_Only" presentation:presentation-page-layout-name="AL2">
        <draw:frame xml:id="id13" draw:id="id13" draw:name="object 2" draw:text-style-name="P37" draw:layer="layout" presentation:style-name="pr10" presentation:class="title" presentation:placeholder="true" svg:width="28.77cm" svg:height="3.412cm" svg:x="0.094cm" svg:y="0.4cm">
          <draw:text-box fo:min-height="3.412cm">
            <text:p text:style-name="P38"><text:span text:style-name="T49">Этапы реализации</text:span></text:p>
          </draw:text-box>
        </draw:frame>
        <draw:frame xml:id="id14" draw:id="id14" draw:name="object 4" draw:text-style-name="P39" draw:layer="layout" presentation:style-name="pr11" presentation:class="page-number" presentation:placeholder="true" svg:width="1.777cm" svg:height="1.349cm" svg:x="30.94cm" svg:y="17.52cm">
          <draw:text-box fo:min-height="1.349cm">
            <text:p text:style-name="P40"><text:span text:style-name="T50"><text:page-number>&lt;number&gt;</text:page-number></text:span></text:p>
          </draw:text-box>
        </draw:frame>
        <draw:frame xml:id="id15" draw:id="id15" draw:style-name="gr5" svg:width="29.96cm" svg:height="13cm" svg:x="1.536cm" svg:y="4.14cm">
          <draw:image xlink:href="Pictures/image1.png" xlink:type="simple" xlink:show="embed" xlink:actuate="onLoad"/>
        </draw:frame>
        <presentation:notes draw:style-name="dp12">
          <draw:frame xml:id="id16" draw:id="id16" draw:text-style-name="P41" draw:layer="layout" presentation:style-name="pr12" presentation:class="outline" presentation:placeholder="true" svg:width="16.8cm" svg:height="13.36cm" svg:x="2.1cm" svg:y="14.11cm">
            <draw:text-box fo:min-height="13.36cm">
              <text:p text:style-name="P42"><text:span/></text:p>
            </draw:text-box>
          </draw:frame>
        </presentation:notes>
      </draw:page>
      <draw:page draw:name="Этапы реализации" draw:style-name="dp13" draw:master-page-name="____5f__5f_5f_5f__5f_5f_5f__5f_5f_5f__5f_5f_5f_5f_5f_5f_5f_Title_5f_5f_5f_5f_5f_5f_5f_20_5f_5f_5f_5f_5f_5f_5f_Only" presentation:presentation-page-layout-name="AL2">
        <draw:frame xml:id="id17" draw:id="id17" draw:name="object 2" draw:text-style-name="P43" draw:layer="layout" presentation:style-name="pr13" presentation:class="title" presentation:placeholder="true" svg:width="28.82cm" svg:height="3.158cm" svg:x="0.094cm" svg:y="0.4cm">
          <draw:text-box fo:min-height="3.158cm">
            <text:p text:style-name="P44"><text:span text:style-name="T51">Функциональность приложения</text:span></text:p>
          </draw:text-box>
        </draw:frame>
        <draw:frame xml:id="id18" draw:id="id18" draw:name="object 4" draw:text-style-name="P45" draw:layer="layout" presentation:style-name="pr14" presentation:class="page-number" presentation:placeholder="true" svg:width="1.777cm" svg:height="1.525cm" svg:x="31.08cm" svg:y="17.43cm">
          <draw:text-box fo:min-height="1.525cm">
            <text:p text:style-name="P46"><text:span text:style-name="T52">4</text:span></text:p>
          </draw:text-box>
        </draw:frame>
        <draw:frame xml:id="id19" draw:id="id19" draw:style-name="gr6" svg:width="29.15cm" svg:height="8.384cm" svg:x="0.643cm" svg:y="5.292cm">
          <draw:text-box fo:min-height="8.384cm">
            <text:list text:style-name="L15" text:continue-numbering="true">
              <text:list-item>
                <text:p text:style-name="P47"><text:span text:style-name="T53"> Регистрация и аутентификация.</text:span></text:p>
              </text:list-item>
            </text:list>
            <text:list text:style-name="L16" text:continue-numbering="true">
              <text:list-item>
                <text:p text:style-name="P48"><text:span text:style-name="T54"> Каталог тренировок и конструктор своих планов.</text:span></text:p>
              </text:list-item>
            </text:list>
            <text:list text:style-name="L17" text:continue-numbering="true">
              <text:list-item>
                <text:p text:style-name="P49"><text:span text:style-name="T55"> Проведение тренировки: таймер, аудиосопровождение.</text:span></text:p>
              </text:list-item>
            </text:list>
            <text:list text:style-name="L18" text:continue-numbering="true">
              <text:list-item>
                <text:p text:style-name="P50"><text:span text:style-name="T56"> История выполненных занятий.</text:span></text:p>
              </text:list-item>
            </text:list>
            <text:list text:style-name="L19" text:continue-numbering="true">
              <text:list-item>
                <text:p text:style-name="P51"><text:span text:style-name="T57"> Трекер сна</text:span></text:p>
              </text:list-item>
            </text:list>
            <text:list text:style-name="L20" text:continue-numbering="true">
              <text:list-item>
                <text:p text:style-name="P52"><text:span text:style-name="T58"> Интеллектуальный модуль «Советы»:</text:span><text:span text:style-name="T59"> Анализирует историю тренировок и сна и автоматически предлагает </text:span><text:span text:style-name="T60">уменьшение нагрузки или прогрессивное увеличение сложности тренировок</text:span></text:p>
              </text:list-item>
            </text:list>
          </draw:text-box>
        </draw:frame>
        <presentation:notes draw:style-name="dp14">
          <draw:frame xml:id="id20" draw:id="id20" draw:text-style-name="P53" draw:layer="layout" presentation:style-name="pr15" presentation:class="outline" presentation:placeholder="true" svg:width="16.8cm" svg:height="13.36cm" svg:x="2.1cm" svg:y="14.11cm">
            <draw:text-box fo:min-height="13.36cm">
              <text:p text:style-name="P54"><text:span/></text:p>
            </draw:text-box>
          </draw:frame>
        </presentation:notes>
      </draw:page>
      <draw:page draw:name="Пользовательский интерфейс" draw:style-name="dp15" draw:master-page-name="____5f__5f_5f_5f__5f_5f_5f__5f_5f_5f__5f_5f_5f_5f_5f_5f_5f_Title_5f_5f_5f_5f_5f_5f_5f_20_5f_5f_5f_5f_5f_5f_5f_Only" presentation:presentation-page-layout-name="AL2">
        <draw:frame xml:id="id21" draw:id="id21" draw:name="object 2" draw:text-style-name="P55" draw:layer="layout" presentation:style-name="pr16" presentation:class="title" presentation:placeholder="true" svg:width="28.77cm" svg:height="3.412cm" svg:x="0cm" svg:y="0.015cm">
          <draw:text-box fo:min-height="3.412cm">
            <text:p text:style-name="P56"><text:span text:style-name="T61">П</text:span><text:span text:style-name="T62">ол</text:span><text:span text:style-name="T63">ьз</text:span><text:span text:style-name="T64">ов</text:span><text:span text:style-name="T65">ат</text:span><text:span text:style-name="T66">ел</text:span><text:span text:style-name="T67">ьс</text:span><text:span text:style-name="T68">к</text:span><text:span text:style-name="T69">и</text:span><text:span text:style-name="T70">й</text:span><text:span text:style-name="T71"><text:s/></text:span><text:span text:style-name="T72">и</text:span><text:span text:style-name="T73">нт</text:span><text:span text:style-name="T74">ер</text:span><text:span text:style-name="T75">ф</text:span><text:span text:style-name="T76">е</text:span><text:span text:style-name="T77">йс</text:span></text:p>
          </draw:text-box>
        </draw:frame>
        <draw:frame xml:id="id22" draw:id="id22" draw:name="TextBox 2" draw:style-name="gr7" svg:width="1.208cm" svg:height="1.775cm" svg:x="31.68cm" svg:y="17.25cm">
          <draw:text-box fo:min-height="1.775cm">
            <text:p text:style-name="P57"><text:span text:style-name="T78">5</text:span></text:p>
          </draw:text-box>
        </draw:frame>
        <draw:frame xml:id="id23" draw:id="id23" draw:style-name="gr8" svg:width="6.332cm" svg:height="14.07cm" svg:x="20.42cm" svg:y="3.525cm">
          <draw:image xlink:href="Pictures/image2.png" xlink:type="simple" xlink:show="embed" xlink:actuate="onLoad"/>
        </draw:frame>
        <draw:frame xml:id="id24" draw:id="id24" draw:style-name="gr9" svg:width="6.306cm" svg:height="14.01cm" svg:x="26.95cm" svg:y="3.525cm">
          <draw:image xlink:href="Pictures/image3.png" xlink:type="simple" xlink:show="embed" xlink:actuate="onLoad"/>
        </draw:frame>
        <draw:frame xml:id="id25" draw:id="id25" draw:style-name="gr10" svg:width="6.199cm" svg:height="13.78cm" svg:x="0.485cm" svg:y="3.819cm">
          <draw:image xlink:href="Pictures/image4.png" xlink:type="simple" xlink:show="embed" xlink:actuate="onLoad"/>
        </draw:frame>
        <draw:frame xml:id="id26" draw:id="id26" draw:style-name="gr11" svg:width="6.174cm" svg:height="13.72cm" svg:x="7.149cm" svg:y="3.819cm">
          <draw:image xlink:href="Pictures/image5.png" xlink:type="simple" xlink:show="embed" xlink:actuate="onLoad"/>
        </draw:frame>
        <draw:frame xml:id="id27" draw:id="id27" draw:style-name="gr12" svg:width="6.225cm" svg:height="13.83cm" svg:x="13.77cm" svg:y="3.665cm">
          <draw:image xlink:href="Pictures/image6.png" xlink:type="simple" xlink:show="embed" xlink:actuate="onLoad"/>
        </draw:frame>
        <presentation:notes draw:style-name="dp16">
          <draw:frame xml:id="id28" draw:id="id28" draw:text-style-name="P58" draw:layer="layout" presentation:style-name="pr17" presentation:class="outline" presentation:placeholder="true" svg:width="16.8cm" svg:height="13.36cm" svg:x="2.1cm" svg:y="14.11cm">
            <draw:text-box fo:min-height="13.36cm">
              <text:p text:style-name="P59"><text:span/></text:p>
            </draw:text-box>
          </draw:frame>
        </presentation:notes>
      </draw:page>
      <draw:page draw:name="Пользовательский интерфейс" draw:style-name="dp17" draw:master-page-name="____5f__5f_5f_5f__5f_5f_5f__5f_5f_5f__5f_5f_5f_5f_5f_5f_5f_Title_5f_5f_5f_5f_5f_5f_5f_20_5f_5f_5f_5f_5f_5f_5f_Only" presentation:presentation-page-layout-name="AL2">
        <draw:frame xml:id="id29" draw:id="id29" draw:name="object 2" draw:text-style-name="P60" draw:layer="layout" presentation:style-name="pr18" presentation:class="title" presentation:placeholder="true" svg:width="28.77cm" svg:height="3.412cm" svg:x="0cm" svg:y="0.015cm">
          <draw:text-box fo:min-height="3.412cm">
            <text:p text:style-name="P61"><text:span text:style-name="T79">Пользовательский</text:span><text:span text:style-name="T80"><text:s/></text:span><text:span text:style-name="T81">интерфейс</text:span></text:p>
          </draw:text-box>
        </draw:frame>
        <draw:frame xml:id="id30" draw:id="id30" draw:name="TextBox 2" draw:style-name="gr13" svg:width="1.208cm" svg:height="1.775cm" svg:x="31.68cm" svg:y="17.25cm">
          <draw:text-box fo:min-height="1.775cm">
            <text:p text:style-name="P62"><text:span text:style-name="T82">6</text:span></text:p>
          </draw:text-box>
        </draw:frame>
        <draw:frame xml:id="id31" draw:id="id31" draw:style-name="gr14" svg:width="6.174cm" svg:height="14.06cm" svg:x="13.7cm" svg:y="3.704cm">
          <draw:image xlink:href="Pictures/image7.png" xlink:type="simple" xlink:show="embed" xlink:actuate="onLoad"/>
        </draw:frame>
        <draw:frame xml:id="id32" draw:id="id32" draw:style-name="gr15" svg:width="6.221cm" svg:height="13.93cm" svg:x="20.48cm" svg:y="3.704cm">
          <draw:image xlink:href="Pictures/image8.png" xlink:type="simple" xlink:show="embed" xlink:actuate="onLoad"/>
        </draw:frame>
        <draw:frame xml:id="id33" draw:id="id33" draw:style-name="gr16" svg:width="6.397cm" svg:height="13.79cm" svg:x="27.17cm" svg:y="3.849cm">
          <draw:image xlink:href="Pictures/image9.png" xlink:type="simple" xlink:show="embed" xlink:actuate="onLoad"/>
        </draw:frame>
        <draw:frame xml:id="id34" draw:id="id34" draw:style-name="gr17" svg:width="6.162cm" svg:height="13.88cm" svg:x="6.88cm" svg:y="3.849cm">
          <draw:image xlink:href="Pictures/image10.png" xlink:type="simple" xlink:show="embed" xlink:actuate="onLoad"/>
        </draw:frame>
        <draw:frame xml:id="id35" draw:id="id35" draw:style-name="gr18" svg:width="6.212cm" svg:height="14.11cm" svg:x="0.288cm" svg:y="3.704cm">
          <draw:image xlink:href="Pictures/image11.png" xlink:type="simple" xlink:show="embed" xlink:actuate="onLoad"/>
        </draw:frame>
        <presentation:notes draw:style-name="dp18">
          <draw:frame xml:id="id36" draw:id="id36" draw:text-style-name="P63" draw:layer="layout" presentation:style-name="pr19" presentation:class="outline" presentation:placeholder="true" svg:width="16.8cm" svg:height="13.36cm" svg:x="2.1cm" svg:y="14.11cm">
            <draw:text-box fo:min-height="13.36cm">
              <text:p text:style-name="P64"><text:span/></text:p>
            </draw:text-box>
          </draw:frame>
        </presentation:notes>
      </draw:page>
      <draw:page draw:name="Заключение" draw:style-name="dp19" draw:master-page-name="____5f__5f_5f_5f__5f_5f_5f__5f_5f_5f__5f_5f_5f_5f_5f_5f_5f_Title_5f_5f_5f_5f_5f_5f_5f_20_5f_5f_5f_5f_5f_5f_5f_and_5f_5f_5f_5f_5f_5f_5f_20_5f_5f_5f_5f_5f_5f_5f_Content" presentation:presentation-page-layout-name="AL1">
        <draw:frame xml:id="id37" draw:id="id37" draw:name="object 2" draw:text-style-name="P65" draw:layer="layout" presentation:style-name="pr20" presentation:class="title" presentation:placeholder="true" svg:width="28.77cm" svg:height="4.475cm" svg:x="2.307cm" svg:y="0.4cm">
          <draw:text-box fo:min-height="4.475cm">
            <text:p text:style-name="P66"><text:span text:style-name="T83">Заключение</text:span></text:p>
          </draw:text-box>
        </draw:frame>
        <draw:frame xml:id="id38" draw:id="id38" draw:name="object 3" draw:style-name="gr19" svg:width="31.73cm" svg:height="12.22cm" svg:x="1.129cm" svg:y="4.632cm">
          <draw:text-box fo:min-height="12.22cm">
            <text:p text:style-name="P67"><text:span text:style-name="T84">В ходе выполнения работы были выполнены следующие задачи:</text:span></text:p>
            <text:p text:style-name="P68"><text:span text:style-name="T85">1. Разработ</text:span><text:span text:style-name="T86">ан</text:span><text:span text:style-name="T87"> пользовательск</text:span><text:span text:style-name="T88">ий </text:span><text:span text:style-name="T89">интерфейс</text:span><text:span text:style-name="T90"><text:s/></text:span><text:span text:style-name="T91">с интуитивной навигацией.</text:span></text:p>
            <text:p text:style-name="P69"><text:span text:style-name="T92">2. Создан</text:span><text:span text:style-name="T93">а</text:span><text:span text:style-name="T94"> системы работы с данными и локальной базой</text:span><text:span text:style-name="T95"> данных</text:span><text:span text:style-name="T96">.</text:span></text:p>
            <text:p text:style-name="P70"><text:span text:style-name="T97">3. Реализ</text:span><text:span text:style-name="T98">ована</text:span><text:span text:style-name="T99"> бизнес-логик</text:span><text:span text:style-name="T100">а</text:span><text:span text:style-name="T101"> для тренировок и отслеживания прогресса.</text:span></text:p>
            <text:p text:style-name="P71"><text:span text:style-name="T102">4. </text:span><text:span text:style-name="T103">Сп</text:span><text:span text:style-name="T104">роектирован</text:span><text:span text:style-name="T105">о</text:span><text:span text:style-name="T106"> и разработ</text:span><text:span text:style-name="T107">ано</text:span><text:span text:style-name="T108"> серверно</text:span><text:span text:style-name="T109">е</text:span><text:span text:style-name="T110"> приложени</text:span><text:span text:style-name="T111">е</text:span><text:span text:style-name="T112"> (бэкенд).</text:span></text:p>
            <text:p text:style-name="P72"><text:span text:style-name="T113">5. </text:span><text:span text:style-name="T114">Проведено к</text:span><text:span text:style-name="T115">омплексное тестирование </text:span><text:span text:style-name="T116">мобильного приложения</text:span><text:span text:style-name="T117">, бэкенда и алгоритмов.</text:span></text:p>
            <text:p text:style-name="P73"><text:span/></text:p>
            <text:p text:style-name="P74"><text:span text:style-name="T118">Ключевое отличие:</text:span><text:span text:style-name="T119"> Реализована система адаптивного планирования, формирующая </text:span><text:span text:style-name="T120">замкнутый цикл «нагрузка – восстановление – анализ – рекомендация»</text:span></text:p>
          </draw:text-box>
        </draw:frame>
        <presentation:notes draw:style-name="dp20">
          <draw:frame xml:id="id39" draw:id="id39" draw:text-style-name="P75" draw:layer="layout" presentation:style-name="pr21" presentation:class="outline" presentation:placeholder="true" svg:width="16.8cm" svg:height="13.36cm" svg:x="2.1cm" svg:y="14.11cm">
            <draw:text-box fo:min-height="13.36cm">
              <text:p text:style-name="P76"><text:span/></text:p>
            </draw:text-box>
          </draw:frame>
        </presentation:notes>
      </draw:page>
      <draw:page draw:name="Спасибо за внимание!" draw:style-name="dp21" draw:master-page-name="____5f__5f_5f_5f__5f_5f_5f__5f_5f_5f__5f_5f_5f_5f_5f_5f_5f_Title_5f_5f_5f_5f_5f_5f_5f_20_5f_5f_5f_5f_5f_5f_5f_Only" presentation:presentation-page-layout-name="AL2">
        <draw:frame xml:id="id40" draw:id="id40" draw:name="object 2" draw:text-style-name="P77" draw:layer="layout" presentation:style-name="pr22" presentation:class="title" presentation:placeholder="true" svg:width="20.99cm" svg:height="3.213cm" svg:x="6.44cm" svg:y="7.612cm">
          <draw:text-box fo:min-height="3.213cm">
            <text:p text:style-name="P78"><text:span text:style-name="T121">Спасибо</text:span><text:span text:style-name="T122"><text:s/></text:span><text:span text:style-name="T123">за</text:span><text:span text:style-name="T124"><text:s/></text:span><text:span text:style-name="T125">внимание!</text:span></text:p>
          </draw:text-box>
        </draw:frame>
        <presentation:notes draw:style-name="dp22">
          <draw:frame xml:id="id41" draw:id="id41" draw:text-style-name="P79" draw:layer="layout" presentation:style-name="pr23" presentation:class="outline" presentation:placeholder="true" svg:width="16.8cm" svg:height="13.36cm" svg:x="2.1cm" svg:y="14.11cm">
            <draw:text-box fo:min-height="13.36cm">
              <text:p text:style-name="P80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9">
      <style:drawing-page-properties draw:fill-color="#FFFFFF" draw:fill="solid"/>
    </style:style>
    <style:style style:family="presentation" style:name="pr8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presentation" style:name="pr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5">
      <style:paragraph-properties/>
      <style:text-properties/>
    </style:style>
    <style:style style:family="paragraph" style:name="P36">
      <style:paragraph-properties/>
      <style:text-properties/>
    </style:style>
    <style:style style:family="drawing-page" style:name="dp10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__5f__5f_5f_5f__5f_5f_5f__5f_5f_5f__5f_5f_5f_5f_5f_5f_5f_Title_5f_5f_5f_5f_5f_5f_5f_20_5f_5f_5f_5f_5f_5f_5f_and_5f_5f_5f_5f_5f_5f_5f_20_5f_5f_5f_5f_5f_5f_5f_Content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__5f__5f_5f_5f__5f_5f_5f__5f_5f_5f__5f_5f_5f_5f_5f_5f_5f_Title_5f_5f_5f_5f_5f_5f_5f_20_5f_5f_5f_5f_5f_5f_5f_Only" style:page-layout-name="Mpm3" draw:style-name="dp9">
      <presentation:notes draw:style-name="dp10" style:page-layout-name="Mpm4"/>
      <draw:frame xml:id="id11" draw:id="id11" draw:name="place_holder" draw:text-style-name="P33" draw:layer="backgroundobjects" presentation:style-name="pr8" presentation:class="title" presentation:placeholder="false" presentation:user-transformed="true" svg:width="23.91cm" svg:height="3.507cm" svg:x="2.058cm" svg:y="1.743cm">
        <draw:text-box fo:min-height="3.507cm">
          <text:p text:style-name="P34"><text:span/></text:p>
        </draw:text-box>
      </draw:frame>
      <draw:frame xml:id="id12" draw:id="id12" draw:name="place_holder" draw:text-style-name="P35" draw:layer="backgroundobjects" presentation:style-name="pr9" presentation:class="outline" presentation:placeholder="false" presentation:user-transformed="true" svg:width="23.91cm" svg:height="13.23cm" svg:x="2.058cm" svg:y="5.838cm">
        <draw:text-box fo:min-height="13.23cm">
          <text:p text:style-name="P36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